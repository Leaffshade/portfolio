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1000000F5B5595B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682b4" loext:opacity="100%" style:font-name="Snap ITC" fo:font-size="20pt" fo:font-weight="bold" officeooo:rsid="001390d4" officeooo:paragraph-rsid="001390d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390d4" officeooo:paragraph-rsid="001390d4"/>
    </style:style>
    <style:style style:name="P3" style:family="paragraph" style:parent-style-name="Standard">
      <style:text-properties style:font-name="Calibri" fo:font-size="12pt" officeooo:rsid="001390d4" officeooo:paragraph-rsid="001390d4" style:font-size-asian="12pt" style:font-size-complex="12pt"/>
    </style:style>
    <style:style style:name="P4" style:family="paragraph" style:parent-style-name="Standard">
      <style:text-properties fo:color="#4682b4" loext:opacity="100%" style:font-name="Calibri" fo:font-size="12pt" style:text-underline-style="solid" style:text-underline-width="auto" style:text-underline-color="font-color" officeooo:rsid="00182028" officeooo:paragraph-rsid="001390d4" style:font-size-asian="12pt" style:font-size-complex="12pt"/>
    </style:style>
    <style:style style:name="P5" style:family="paragraph" style:parent-style-name="Standard">
      <style:text-properties fo:color="#4682b4" loext:opacity="100%" style:font-name="Calibri" fo:font-size="12pt" officeooo:rsid="00182028" officeooo:paragraph-rsid="00182028" style:font-size-asian="12pt" style:font-size-complex="12pt"/>
    </style:style>
    <style:style style:name="P6" style:family="paragraph" style:parent-style-name="Standard">
      <style:text-properties style:font-name="Calibri" fo:font-size="12pt" officeooo:rsid="001390d4" officeooo:paragraph-rsid="0026d009" style:font-size-asian="12pt" style:font-size-complex="12pt"/>
    </style:style>
    <style:style style:name="P7" style:family="paragraph" style:parent-style-name="Heading_20_2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>
      <style:text-properties style:font-name="Calibri" fo:font-size="12pt" officeooo:rsid="0023c3a7" officeooo:paragraph-rsid="0023c3a7" style:font-size-asian="12pt" style:font-size-complex="12pt"/>
    </style:style>
    <style:style style:name="P10" style:family="paragraph" style:parent-style-name="Text_20_body">
      <style:text-properties style:font-name="Calibri" fo:font-size="12pt" officeooo:rsid="0014a952" officeooo:paragraph-rsid="0014a952" style:font-size-asian="12pt" style:font-size-complex="12pt"/>
    </style:style>
    <style:style style:name="P11" style:family="paragraph" style:parent-style-name="Text_20_body">
      <style:text-properties style:font-name="Calibri" fo:font-size="12pt" officeooo:rsid="00198697" officeooo:paragraph-rsid="001ac1db" style:font-size-asian="12pt" style:font-size-complex="12pt"/>
    </style:style>
    <style:style style:name="P12" style:family="paragraph" style:parent-style-name="Text_20_body">
      <style:text-properties style:font-name="Calibri" fo:font-size="12pt" officeooo:rsid="00198697" officeooo:paragraph-rsid="00198697" style:font-size-asian="12pt" style:font-size-complex="12pt"/>
    </style:style>
    <style:style style:name="P13" style:family="paragraph" style:parent-style-name="Text_20_body">
      <style:text-properties style:font-name="Calibri" fo:font-size="12pt" officeooo:rsid="002131be" officeooo:paragraph-rsid="002131be" style:font-size-asian="12pt" style:font-size-complex="12pt"/>
    </style:style>
    <style:style style:name="T1" style:family="text">
      <style:text-properties officeooo:rsid="001624af"/>
    </style:style>
    <style:style style:name="T2" style:family="text">
      <style:text-properties officeooo:rsid="00193cb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6c4f8"/>
    </style:style>
    <style:style style:name="T5" style:family="text">
      <style:text-properties officeooo:rsid="00258974"/>
    </style:style>
    <style:style style:name="T6" style:family="text">
      <style:text-properties officeooo:rsid="001390d4"/>
    </style:style>
    <style:style style:name="T7" style:family="text">
      <style:text-properties officeooo:rsid="0015132c"/>
    </style:style>
    <style:style style:name="T8" style:family="text">
      <style:text-properties officeooo:rsid="001e15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1e1575" style:font-weight-asian="normal" style:font-weight-complex="normal"/>
    </style:style>
    <style:style style:name="T11" style:family="text">
      <style:text-properties fo:font-weight="normal" officeooo:rsid="0028b12a" style:font-weight-asian="normal" style:font-weight-complex="normal"/>
    </style:style>
    <style:style style:name="T12" style:family="text">
      <style:text-properties officeooo:rsid="002131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3">- Créer un nouveau repositor<text:span text:style-name="T1">ie</text:span> (cocher pour créer le README)</text:p>
      <text:p text:style-name="P3">- Mettre la description du projet dans le README</text:p>
      <text:p text:style-name="P3"/>
      <text:p text:style-name="P4">Pour la mise en page :</text:p>
      <text:p text:style-name="P3"/>
      <text:p text:style-name="P5"># : Permet de mettre en gras et Grand (style Title)</text:p>
      <text:p text:style-name="P5">## : Permet de mettre en gras moins grand <text:span text:style-name="T2">(sous-titre)</text:span></text:p>
      <text:p text:style-name="P5">--- : En faisant un retour à la ligne <text:span text:style-name="T3">avant et après les 3 tirets,</text:span> cela permet de créer un trait gris (pour faire des catégories)</text:p>
      <text:p text:style-name="P3"/>
      <text:p text:style-name="P6">- <text:span text:style-name="T4">Retourner sur le repo, et faire « Add file », </text:span></text:p>
      <text:p text:style-name="P6">- Créer un dossier image/test.png <text:span text:style-name="T5">puis faire commit.</text:span></text:p>
      <text:p text:style-name="P3">- Mettre les images dans ce dossier (drag &amp; drop)</text:p>
      <text:p text:style-name="P3">- Puis dans le README mettre à la fin de la description les images comme ceci :</text:p>
      <text:h text:style-name="P7" text:outline-level="2">📷 <text:span text:style-name="T6">Images</text:span> :</text:h>
      <text:p text:style-name="P8">!<text:span text:style-name="T6">[nom de l’image](images/nomdelimage.png)</text:span></text:p>
      <text:p text:style-name="P8"/>
      <text:p text:style-name="P9">html pour drapeau anglais :</text:p>
      <text:p text:style-name="Text_20_body">&lt;img width="20" src="https://cdnjs.cloudflare.com/ajax/libs/twemoji/14.0.2/svg/1f1ec-1f1e7.svg" /&gt;</text:p>
      <text:p text:style-name="Text_20_body"/>
      <text:p text:style-name="P9">html pour drapeau français :</text:p>
      <text:p text:style-name="P9">&lt;img width="20" src="https://github.com/user-attachments/assets/72fd52aa-5166-461c-8ef6-f51a74c0374a" /&gt;</text:p>
      <text:p text:style-name="P8"/>
      <text:p text:style-name="P10">Supprimer le fichier test.png car il ne sert plus <text:span text:style-name="T7">à rien</text:span>.</text:p>
      <text:p text:style-name="P10"/>
      <text:p text:style-name="P11">Attention car lors d’un nouveau repositorie, GitHub pages peut ne pas avoir la bonne branch</text:p>
      <text:p text:style-name="P11">(ce qui fait que le portfolio en ligne ne se met pas à jour). Pour cela aller :</text:p>
      <text:p text:style-name="P12">- Dans le repositorie</text:p>
      <text:p text:style-name="P12">- Settings</text:p>
      <text:p text:style-name="P12">- Pages</text:p>
      <text:p text:style-name="P12">- Vérifier la <text:span text:style-name="T8">que la </text:span><text:span text:style-name="T9">Source</text:span> et la <text:span text:style-name="T9">Branch </text:span><text:span text:style-name="T10">soi</text:span><text:span text:style-name="T11">en</text:span><text:span text:style-name="T10">t comme sur l’image</text:span>, puis Sauvegarder.</text:p>
      <text:p text:style-name="P12"><draw:frame draw:style-name="fr1" draw:name="Image1" text:anchor-type="char" svg:width="17cm" svg:height="5.198cm" draw:z-index="0"><draw:image xlink:href="Pictures/1000000100000321000000F5B5595BC0.png" xlink:type="simple" xlink:show="embed" xlink:actuate="onLoad" draw:mime-type="image/png"/></draw:frame><text:soft-page-break/><text:span text:style-name="T12"><text:line-break/><text:line-break/><text:line-break/><text:line-break/>Si le commit sur VSCode ne fonctionne pas. Que ça mouline tout le temps et ne s’arrête pas. Et que la mise à jour du code ne se fait pas sur le site web :<text:line-break/><text:line-break/>Dans le terminal, faire :</text:span></text:p>
      <text:p text:style-name="P12">- <text:span text:style-name="T12">git add</text:span></text:p>
      <text:p text:style-name="P12">- <text:span text:style-name="T12">git commit -m "update portfolio"</text:span></text:p>
      <text:p text:style-name="P13">- git push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eelawadee UI Semilight" fo:font-family="'Leelawadee UI Semilight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eelawadee UI Semilight" fo:font-family="'Leelawadee UI Semilight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59:27.547135700</meta:creation-date>
    <dc:date>2026-07-17T18:06:45.423723900</dc:date>
    <meta:editing-duration>PT5H17M7S</meta:editing-duration>
    <meta:editing-cycles>23</meta:editing-cycles>
    <meta:generator>LibreOffice/26.2.1.2$Windows_X86_64 LibreOffice_project/620$Build-2</meta:generator>
    <meta:document-statistic meta:table-count="0" meta:image-count="1" meta:object-count="0" meta:page-count="2" meta:paragraph-count="28" meta:word-count="262" meta:character-count="1493" meta:non-whitespace-character-count="1253"/>
  </office:meta>
</office:document-meta>
</file>