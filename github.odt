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1000000F5B5595B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eelawadee UI Semilight" svg:font-family="'Leelawadee UI Semi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nap ITC" svg:font-family="'Snap ITC'" style:font-family-generic="decorative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682b4" loext:opacity="100%" style:font-name="Snap ITC" fo:font-size="20pt" fo:font-weight="bold" officeooo:rsid="001390d4" officeooo:paragraph-rsid="001390d4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390d4" officeooo:paragraph-rsid="001390d4"/>
    </style:style>
    <style:style style:name="P3" style:family="paragraph" style:parent-style-name="Standard">
      <style:text-properties style:font-name="Calibri" fo:font-size="12pt" officeooo:rsid="001390d4" officeooo:paragraph-rsid="001390d4" style:font-size-asian="12pt" style:font-size-complex="12pt"/>
    </style:style>
    <style:style style:name="P4" style:family="paragraph" style:parent-style-name="Standard">
      <style:text-properties fo:color="#4682b4" loext:opacity="100%" style:font-name="Calibri" fo:font-size="12pt" style:text-underline-style="solid" style:text-underline-width="auto" style:text-underline-color="font-color" officeooo:rsid="00182028" officeooo:paragraph-rsid="001390d4" style:font-size-asian="12pt" style:font-size-complex="12pt"/>
    </style:style>
    <style:style style:name="P5" style:family="paragraph" style:parent-style-name="Standard">
      <style:text-properties fo:color="#4682b4" loext:opacity="100%" style:font-name="Calibri" fo:font-size="12pt" officeooo:rsid="00182028" officeooo:paragraph-rsid="00182028" style:font-size-asian="12pt" style:font-size-complex="12pt"/>
    </style:style>
    <style:style style:name="P6" style:family="paragraph" style:parent-style-name="Heading_20_2">
      <style:text-properties style:font-name="Calibri" fo:font-size="12pt" style:font-size-asian="12pt" style:font-size-complex="12pt"/>
    </style:style>
    <style:style style:name="P7" style:family="paragraph" style:parent-style-name="Text_20_body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officeooo:rsid="0014a952" officeooo:paragraph-rsid="0014a952" style:font-size-asian="12pt" style:font-size-complex="12pt"/>
    </style:style>
    <style:style style:name="P9" style:family="paragraph" style:parent-style-name="Text_20_body">
      <style:text-properties style:font-name="Calibri" fo:font-size="12pt" officeooo:rsid="00198697" officeooo:paragraph-rsid="001ac1db" style:font-size-asian="12pt" style:font-size-complex="12pt"/>
    </style:style>
    <style:style style:name="P10" style:family="paragraph" style:parent-style-name="Text_20_body">
      <style:text-properties style:font-name="Calibri" fo:font-size="12pt" officeooo:rsid="00198697" officeooo:paragraph-rsid="00198697" style:font-size-asian="12pt" style:font-size-complex="12pt"/>
    </style:style>
    <style:style style:name="T1" style:family="text">
      <style:text-properties officeooo:rsid="001624af"/>
    </style:style>
    <style:style style:name="T2" style:family="text">
      <style:text-properties officeooo:rsid="00193cb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390d4"/>
    </style:style>
    <style:style style:name="T5" style:family="text">
      <style:text-properties officeooo:rsid="0015132c"/>
    </style:style>
    <style:style style:name="T6" style:family="text">
      <style:text-properties officeooo:rsid="001e15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1e1575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2"/>
      <text:p text:style-name="P3">- Créer un nouveau repositor<text:span text:style-name="T1">ie</text:span> (cocher pour créer le README)</text:p>
      <text:p text:style-name="P3">- Mettre la description du projet dans le README</text:p>
      <text:p text:style-name="P3"/>
      <text:p text:style-name="P4">Pour la mise en page :</text:p>
      <text:p text:style-name="P3"/>
      <text:p text:style-name="P5"># : Permet de mettre en gras et Grand (style Title)</text:p>
      <text:p text:style-name="P5">## : Permet de mettre en gras moins grand <text:span text:style-name="T2">(sous-titre)</text:span></text:p>
      <text:p text:style-name="P5">--- : En faisant un retour à la ligne <text:span text:style-name="T3">avant et après les 3 tirets,</text:span> cela permet de créer un trait gris (pour faire des catégories)</text:p>
      <text:p text:style-name="P3"/>
      <text:p text:style-name="P3">- Créer un dossier image/test,png</text:p>
      <text:p text:style-name="P3">- Mettre les images dans ce dossier (drag &amp; drop)</text:p>
      <text:p text:style-name="P3">- Puis dans le README, mettre à la fin de la description les images comme ceci :</text:p>
      <text:h text:style-name="P6" text:outline-level="2">📷 <text:span text:style-name="T4">Images</text:span> :</text:h>
      <text:p text:style-name="P7">!<text:span text:style-name="T4">[nom de l’image](images/nomdelimage.png)</text:span></text:p>
      <text:p text:style-name="P7"/>
      <text:p text:style-name="P8">Supprimer le fichier test.png car il ne sert plus <text:span text:style-name="T5">à rien</text:span>.</text:p>
      <text:p text:style-name="P8"/>
      <text:p text:style-name="P9">Attention car lors d’un nouveau repositorie, GitHub pages peut ne pas avoir la bonne branch</text:p>
      <text:p text:style-name="P9">(ce qui fait que le portfolio en ligne ne se met pas à jour). Pour cela aller :</text:p>
      <text:p text:style-name="P10">- Dans le repositorie</text:p>
      <text:p text:style-name="P10">- Settings</text:p>
      <text:p text:style-name="P10">- Pages</text:p>
      <text:p text:style-name="P10">- Vérifier la <text:span text:style-name="T6">que la </text:span><text:span text:style-name="T7">Source</text:span> et la <text:span text:style-name="T7">Branch </text:span><text:span text:style-name="T8">soit comme sur l’image</text:span>, puis Sauvegarder.</text:p>
      <text:p text:style-name="P10"><draw:frame draw:style-name="fr1" draw:name="Image1" text:anchor-type="char" svg:width="17cm" svg:height="5.198cm" draw:z-index="0"><draw:image xlink:href="Pictures/1000000100000321000000F5B5595B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eelawadee UI Semilight" svg:font-family="'Leelawadee UI Semi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nap ITC" svg:font-family="'Snap ITC'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eelawadee UI Semiligh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eelawadee UI Semiligh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eelawadee UI Semilight" fo:font-family="'Leelawadee UI Semilight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eelawadee UI Semilight" fo:font-family="'Leelawadee UI Semilight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eelawadee UI Semilight" fo:font-family="'Leelawadee UI Semilight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eelawadee UI Semilight" fo:font-family="'Leelawadee UI Semilight'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7:59:27.547135700</meta:creation-date>
    <dc:date>2026-06-07T18:53:02.401269100</dc:date>
    <meta:editing-duration>PT15M43S</meta:editing-duration>
    <meta:editing-cycles>13</meta:editing-cycles>
    <meta:generator>LibreOffice/26.2.1.2$Windows_X86_64 LibreOffice_project/620$Build-2</meta:generator>
    <meta:document-statistic meta:table-count="0" meta:image-count="1" meta:object-count="0" meta:page-count="1" meta:paragraph-count="19" meta:word-count="178" meta:character-count="930" meta:non-whitespace-character-count="771"/>
  </office:meta>
</office:document-meta>
</file>